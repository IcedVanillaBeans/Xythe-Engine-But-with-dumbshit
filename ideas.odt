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73847" officeooo:paragraph-rsid="00173847"/>
    </style:style>
    <style:style style:name="P2" style:family="paragraph" style:parent-style-name="Standard" style:list-style-name="L1">
      <style:text-properties officeooo:rsid="00173847" officeooo:paragraph-rsid="00173847"/>
    </style:style>
    <style:style style:name="P3" style:family="paragraph" style:parent-style-name="Standard" style:list-style-name="L1">
      <style:text-properties officeooo:rsid="0019d4dc" officeooo:paragraph-rsid="0019d4dc"/>
    </style:style>
    <style:style style:name="P4" style:family="paragraph" style:parent-style-name="Standard" style:list-style-name="L1">
      <style:text-properties officeooo:rsid="00180f14" officeooo:paragraph-rsid="00180f14"/>
    </style:style>
    <style:style style:name="P5" style:family="paragraph" style:parent-style-name="Standard" style:list-style-name="L1">
      <style:text-properties officeooo:rsid="001ad436" officeooo:paragraph-rsid="001ad436"/>
    </style:style>
    <style:style style:name="P6" style:family="paragraph" style:parent-style-name="Standard">
      <style:text-properties officeooo:rsid="001ad436" officeooo:paragraph-rsid="001ad436"/>
    </style:style>
    <style:style style:name="P7" style:family="paragraph" style:parent-style-name="Standard">
      <style:text-properties officeooo:paragraph-rsid="001b0b7f"/>
    </style:style>
    <style:style style:name="P8" style:family="paragraph" style:parent-style-name="Standard">
      <style:text-properties officeooo:rsid="001d4c9b" officeooo:paragraph-rsid="001d4c9b"/>
    </style:style>
    <style:style style:name="P9" style:family="paragraph" style:parent-style-name="Standard">
      <style:text-properties officeooo:rsid="001b0b7f" officeooo:paragraph-rsid="001b0b7f"/>
    </style:style>
    <style:style style:name="T1" style:family="text">
      <style:text-properties officeooo:rsid="0017639e"/>
    </style:style>
    <style:style style:name="T2" style:family="text">
      <style:text-properties officeooo:rsid="001bcab7"/>
    </style:style>
    <style:style style:name="T3" style:family="text">
      <style:text-properties officeooo:rsid="001b0b7f"/>
    </style:style>
    <style:style style:name="T4" style:family="text">
      <style:text-properties officeooo:rsid="001ed5b0"/>
    </style:style>
    <style:style style:name="T5" style:family="text">
      <style:text-properties officeooo:rsid="001ef23e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 Idea ] - requires different engine, namely being in 3D</text:p>
      <text:list text:style-name="L1">
        <text:list-item>
          <text:p text:style-name="P2">Native toggle in chart to swap strumlines.</text:p>
        </text:list-item>
        <text:list-item>
          <text:p text:style-name="P2">Native toggle to swap sides of the healthbar, with our without animation.</text:p>
        </text:list-item>
        <text:list-item>
          <text:p text:style-name="P2">Speaking of healthbar:</text:p>
          <text:list>
            <text:list-item>
              <text:p text:style-name="P2">have a middle bound where the player character is in the middle and you have to push away two other char.s from the side. (like for double kill)</text:p>
            </text:list-item>
            <text:list-item>
              <text:p text:style-name="P2">have an event to add drain, remove health, drain/add health without changing the actual value*,or stop health gain/loss all together</text:p>
            </text:list-item>
            <text:list-item>
              <text:p text:style-name="P2">*add visualisor in place of the healthbar (between actual healthbar and icons)</text:p>
            </text:list-item>
          </text:list>
        </text:list-item>
        <text:list-item>
          <text:p text:style-name="P2">icons V2, an engine to work with icons</text:p>
          <text:list>
            <text:list-item>
              <text:p text:style-name="P2">Used to:</text:p>
              <text:list>
                <text:list-item>
                  <text:p text:style-name="P2">Define if its a Single, Normal, Three or Anim type icons.</text:p>
                </text:list-item>
                <text:list-item>
                  <text:p text:style-name="P2">Define the size of each icon</text:p>
                </text:list-item>
                <text:list-item>
                  <text:p text:style-name="P2">Define bop strength</text:p>
                </text:list-item>
                <text:list-item>
                  <text:p text:style-name="P3">event to change whether icons bop automatically or manually. Manual would be triggered by an event!</text:p>
                </text:list-item>
              </text:list>
            </text:list-item>
          </text:list>
        </text:list-item>
        <text:list-item>
          <text:p text:style-name="P2">Advanced notes. Building on the first point we could have events (or maybe even a seperate bit of the chart editor) where we plot where notes go. Or hide them (can be explained further)</text:p>
        </text:list-item>
        <text:list-item>
          <text:p text:style-name="P2">stage editor (psych 1.0’s is ass. Plus it aint compatible with older versions &gt;:O)</text:p>
        </text:list-item>
        <text:list-item>
          <text:p text:style-name="P2">folders inside freeplay (im reaching now) for songs</text:p>
          <text:list>
            <text:list-item>
              <text:p text:style-name="P2">for example, we could have “Week 1 &gt;” and we find all week 1 songs. Inside freeplay</text:p>
            </text:list-item>
            <text:list-item>
              <text:p text:style-name="P2">ins<text:span text:style-name="T1">pired by VS Gorefield</text:span></text:p>
            </text:list-item>
          </text:list>
        </text:list-item>
        <text:list-item>
          <text:p text:style-name="P4">splash text in title/main menu</text:p>
        </text:list-item>
        <text:list-item>
          <text:p text:style-name="P5">Categories in Freeplay</text:p>
          <text:list>
            <text:list-item>
              <text:p text:style-name="P5">metadata for charts defining which category to put it in freeplay</text:p>
            </text:list-item>
            <text:list-item>
              <text:p text:style-name="P5">metadata for albums (inspired by P-Slice engine)</text:p>
            </text:list-item>
          </text:list>
        </text:list-item>
      </text:list>
      <text:p text:style-name="P6"/>
      <text:p text:style-name="P6"/>
      <text:p text:style-name="P6"/>
      <text:p text:style-name="P6"><text:s/><text:tab/><text:tab/><text:tab/><text:tab/><text:tab/> <text:s text:c="4"/>----<text:span text:style-name="T2">My Bullshit----</text:span></text:p>
      <text:p text:style-name="P7"/>
      <text:p text:style-name="P7"/>
      <text:p text:style-name="P7"/>
      <text:p text:style-name="P7"/>
      <text:p text:style-name="P7"><text:span text:style-name="T3">Bullshit -- </text:span>nonsense, lies, or exaggeration.</text:p>
      <text:p text:style-name="P7"><text:s/></text:p>
      <text:p text:style-name="P7"/>
      <text:p text:style-name="P7"/>
      <text:p text:style-name="P7">--<text:span text:style-name="T3">optimizations because friday night funkin’ runs like ass on older hardware.</text:span></text:p>
      <text:p text:style-name="P7"/>
      <text:p text:style-name="P7">--<text:span text:style-name="T2">Stage Swapping</text:span></text:p>
      <text:p text:style-name="P7"/>
      <text:p text:style-name="P7">--<text:span text:style-name="T2">Better UI</text:span></text:p>
      <text:p text:style-name="P7"/>
      <text:p text:style-name="P8">--Option to fucking kill bf lmao</text:p>
      <text:p text:style-name="P8"/>
      <text:p text:style-name="P8">--<text:span text:style-name="T4">Option to do fuckery with Ghost-Tapping</text:span></text:p>
      <text:p text:style-name="P8"/>
      <text:p text:style-name="P8">--<text:span text:style-name="T5">Custom Noteskins</text:span></text:p>
      <text:p text:style-name="P8"/>
      <text:p text:style-name="P8"/>
      <text:p text:style-name="P8"><text:soft-page-break/></text:p>
      <text:p text:style-name="P7"/>
      <text:p text:style-name="P7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2-23T17:17:08.599000000</meta:creation-date>
    <dc:date>2026-07-06T05:46:43.564751500</dc:date>
    <meta:editing-duration>PT5H48M56S</meta:editing-duration>
    <meta:editing-cycles>8</meta:editing-cycles>
    <meta:generator>LibreOffice/26.2.4.2$Windows_X86_64 LibreOffice_project/0229ac93fcf0d7cbc6376066c6f35021cef002dc</meta:generator>
    <meta:document-statistic meta:table-count="0" meta:image-count="0" meta:object-count="0" meta:page-count="2" meta:paragraph-count="31" meta:word-count="307" meta:character-count="1677" meta:non-whitespace-character-count="1416"/>
  </office:meta>
</office:document-meta>
</file>